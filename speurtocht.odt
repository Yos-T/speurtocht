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h text:style-name="Heading_20_1" text:outline-level="1"><text:bookmark-start text:name="speurtocht-de-verdwenen-kleuren-van-het-vlinderpark"/>Speurtocht: De Verdwenen Kleuren van het Vlinderpark<text:bookmark-end text:name="speurtocht-de-verdwenen-kleuren-van-het-vlinderpark"/></text:h>
      <text:h text:style-name="Heading_20_3" text:outline-level="3"><text:bookmark-start text:name="de-start-het-vlinderpark"/>🦋 DE START: Het Vlinderpark<text:bookmark-end text:name="de-start-het-vlinderpark"/></text:h>
      <text:p text:style-name="First_20_paragraph"><text:span text:style-name="T1">(Geef elk kind een wit vlindertje en een nep-klokje)</text:span></text:p>
      <text:p text:style-name="Text_20_body"><text:span text:style-name="T2">VOORLEZEN:</text:span> Waar wij nu wonen was vroeger het Vlinderpark. Het mooiste stukje natuur van Leidschendam. Overal vlogen prachtige vlinders met schitterende kleuren en magische krachten. Maar toen kwamen de grote bouwmachines om de nieuwe huizen te bouwen! Er waaide een enorme, dikke wolk van bouwstof over het park. Alle kleuren van de vlinders raakten bedolven onder een laagje grijs stof… En ook hun magische krachten raakten kwijt.</text:p>
      <text:p text:style-name="Text_20_body">Vlak voordat het stof kwam, hebben de oude vlinders de magische <text:span text:style-name="T2">Vlinderschat</text:span> veilig verstopt. Om te weten waar die ligt, hebben ze overal geheime letters achtergelaten. Maar die letters krijgen we pas als we alle negen kleuren en krachten hebben teruggevonden!</text:p>
      <text:p text:style-name="Text_20_body">Alleen negen jonge witte vlinders kunnen het park nog redden en de schat vinden. Die negen vlinders… zijn jullie.</text:p>
      <text:p text:style-name="Text_20_body">We moeten jullie kleuren en krachten gaan zoeken. Straks vinden we onderweg gekleurde bloemen met een tijd erop. Als je je klokje precies op die tijd zet, wijst de vlinder op je klok je de weg! Zoek de bloemen. Stel je klokje in op de tijd die op de bloem staat. Draai het klokje zodat de grote wijzer wijst naar waar we vandaan kwamen. De kleine wijzer wijst nu waar we heen moeten.</text:p>
      <text:p text:style-name="Horizontal_20_Line"/>
      <text:h text:style-name="Heading_20_3" text:outline-level="3"><text:bookmark-start text:name="start-vlinders-stoepkrijten-voor-het-huis"/>🎨 START: Vlinders stoepkrijten (voor het huis)<text:bookmark-end text:name="start-vlinders-stoepkrijten-voor-het-huis"/></text:h>
      <text:p text:style-name="First_20_paragraph"><text:span text:style-name="T1">(Vlinder 1: Rood Hartje)</text:span></text:p>
      <text:p text:style-name="Text_20_body"><text:span text:style-name="T2">VOORLEZEN:</text:span> “We hebben een belangrijke missie vandaag: de kleuren en magische krachten van het Vlinderpark terugvinden! Om te laten zien dat we er helemaal klaar voor zijn, maken we eerst zelf onze eigen vlinders op de stoep. <text:span text:style-name="T1">(naam Vlinder 1)</text:span>, jij hebt de <text:span text:style-name="T2">Dapperheid</text:span> van het Hartje gekregen, en dapperheid hebben we heel hard nodig voor deze missie! Jij mag de leiding nemen bij de start. Deel het stoepkrijt maar uit, dan maken we hier samen een prachtig en kleurrijk begin van onze speurtocht!”</text:p>
      <text:p text:style-name="Text_20_body"><text:span text:style-name="T1">Alle kinderen versieren de stoep met vlindertekeningen. Vlinder 1 deelt het stoepkrijt uit en moedigt aan.</text:span></text:p>
      <text:p text:style-name="Text_20_body"><text:span text:style-name="T2">VOORLEZEN:</text:span> “Fantastisch! We zijn er klaar voor. <text:span text:style-name="T1">(naam Vlinder 1)</text:span>, jij bent de leider van de eerste route. We moeten op zoek naar de eerste kleur. Speur de omgeving af naar de <text:span text:style-name="T2">Rode Tijd-Bloemen</text:span> en leid ons daarheen!”</text:p>
      <text:list text:style-name="L1">
        <text:list-item>
          <text:p text:style-name="P1"><text:span text:style-name="T2">Lopen naar het eerste spel:</text:span> Vlinder 1 loopt voorop en zoekt de rode bloemen. Klokjes worden gelijk gezet.</text:p>
        </text:list-item>
      </text:list>
      <text:p text:style-name="Horizontal_20_Line"/>
      <text:h text:style-name="Heading_20_3" text:outline-level="3"><text:bookmark-start text:name="etappe-1-boompje-verwisselen-de-gele-bliksem-gouden-klavertje-4"/>⚡ ETAPPE 1: Boompje Verwisselen &amp; De Gele Bliksem + Gouden Klavertje 4<text:bookmark-end text:name="etappe-1-boompje-verwisselen-de-gele-bliksem-gouden-klavertje-4"/></text:h>
      <text:list text:style-name="L2">
        <text:list-item>
          <text:p text:style-name="P2"><text:span text:style-name="T2">Aankomst bij Spel 1 (Boompje verwisselen):</text:span> <text:span text:style-name="T2">VOORLEZEN:</text:span> “We zijn bij de rode bloemen! Tijd voor een spelletje. We spelen Boompje Verwisselen. Eén iemand is de tikker in het midden. Als je naam geroepen wordt, moet je naar een andere boom rennen zonder getikt te worden!” <text:span text:style-name="T1">(Speel het spel)</text:span></text:p>
        </text:list-item>
        <text:list-item>
          <text:p text:style-name="P2"><text:span text:style-name="T2">De Beloning:</text:span> <text:span text:style-name="T1">(Vlinder 2: Gele Bliksem | Vlinder 3: Gouden Klavertje 4)</text:span> <text:span text:style-name="T2">VOORLEZEN:</text:span> “Goed gedaan! En kijk eens wat hier verborgen ligt… Wat flitst daar door het park? Het is de gele kleur en de <text:span text:style-name="T2">Bliksem</text:span>! Deze is voor jou <text:span text:style-name="T1">(naam Vlinder 2)</text:span>. De Bliksem geeft je de kracht van <text:span text:style-name="T2">Supersnelheid</text:span>. En kijk! Daar ligt ook een <text:span text:style-name="T2">Klavertje 4</text:span>! Dit is voor jou <text:span text:style-name="T1">(naam Vlinder 3)</text:span>. Het Klavertje 4 geeft je <text:span text:style-name="T2">Gelukskracht</text:span> – jij voelt precies aan waar we naartoe moeten.”</text:p>
        </text:list-item>
        <text:list-item>
          <text:p text:style-name="P2"><text:span text:style-name="T2">Lopen naar het volgende spel:</text:span> <text:span text:style-name="T2">VOORLEZEN:</text:span> “Jullie zijn nu samen de Gele Leiders. We moeten hier heel snel wegwezen! Jullie bepalen het snelle tempo. Iedereen moet achter jullie aan rennen of heel snel snelwandelen. Let goed op, want we zoeken nu naar de <text:span text:style-name="T2">Gele Tijd-Bloemen</text:span>!”</text:p>
        </text:list-item>
        <text:list-item>
          <text:p text:style-name="P2"><text:span text:style-name="T2">Actie:</text:span> Snelwandelen/rennen achter de twee leiders aan. Ze zoeken gele bloemen en zetten de klokjes gelijk.</text:p>
        </text:list-item>
      </text:list>
      <text:p text:style-name="Horizontal_20_Line"/>
      <text:h text:style-name="Heading_20_3" text:outline-level="3"><text:bookmark-start text:name="etappe-2-matje-springen-de-blauwe-wolk"/>☁️ ETAPPE 2: Matje Springen &amp; De Blauwe Wolk<text:bookmark-end text:name="etappe-2-matje-springen-de-blauwe-wolk"/></text:h>
      <text:list text:style-name="L3">
        <text:list-item>
          <text:p text:style-name="P3"><text:span text:style-name="T2">Aankomst bij Spel 2 (Matje springen):</text:span> <text:span text:style-name="T2">VOORLEZEN:</text:span> “We hebben de gele bloemen gevonden! Maar oh nee, de grote bouwmachines hebben de grond hier veranderd in gevaarlijke, kleverige modder! We moeten oversteken met deze speciale stenen (matjes) zonder de grond te raken. Samenwerken is cruciaal!” <text:span text:style-name="T1">(Speel het spel. Deel matjes uit en steek over).</text:span></text:p>
        </text:list-item>
        <text:list-item>
          <text:p text:style-name="P3"><text:span text:style-name="T2">De Beloning:</text:span> <text:span text:style-name="T1">(Vlinder 4: Blauwe Wolk)</text:span> <text:span text:style-name="T2">VOORLEZEN:</text:span> “We zijn veilig aan de overkant! En ik voel een zacht briesje… we hebben de blauwe kleur en de <text:span text:style-name="T2">Wolk</text:span> gevonden! Deze is voor jou <text:span text:style-name="T1">(naam Vlinder 4)</text:span>. De Wolk geeft je de kracht om te <text:span text:style-name="T2">Zweven</text:span>. Je weegt bijna niks meer!”</text:p>
        </text:list-item>
        <text:list-item>
          <text:p text:style-name="P3"><text:span text:style-name="T2">Lopen naar het volgende spel:</text:span> <text:span text:style-name="T2">VOORLEZEN:</text:span> “Jij bent nu de Blauwe Leider. We moeten naar de volgende plek zweven. Iedereen moet achter jou aan huppelen op zijn tenen en grote, lichte zweefsprongen maken. We zoeken vanaf nu de <text:span text:style-name="T2">Blauwe Tijd-Bloemen</text:span>!”</text:p>
        </text:list-item>
        <text:list-item>
          <text:p text:style-name="P3"><text:span text:style-name="T2">Actie:</text:span> Zweef-sprongen en huppelen achter Vlinder 4. Blauwe bloemen zoeken.</text:p>
        </text:list-item>
      </text:list>
      <text:p text:style-name="Horizontal_20_Line"/>
      <text:h text:style-name="Heading_20_3" text:outline-level="3"><text:bookmark-start text:name="etappe-3-koek-happen-de-roze-bloem"/>🌸 ETAPPE 3: Koek Happen &amp; De Roze Bloem<text:bookmark-end text:name="etappe-3-koek-happen-de-roze-bloem"/></text:h>
      <text:list text:style-name="L4">
        <text:list-item>
          <text:p text:style-name="P4"><text:span text:style-name="T2">Aankomst bij Spel 3 (Koek happen):</text:span> <text:span text:style-name="T2">VOORLEZEN:</text:span> “Daar zijn de blauwe bloemen! Van al dat reizen door het park krijgen we honger. Tijd voor lekkere koekjes! We gaan koek happen, maar let op: handen op je rug!” <text:span text:style-name="T1">(Speel het spel. Iedereen hapt een koekje).</text:span></text:p>
        </text:list-item>
        <text:list-item>
          <text:p text:style-name="P4"><text:span text:style-name="T2">De Beloning:</text:span> <text:span text:style-name="T1">(Vlinder 5: Roze Bloem)</text:span> <text:span text:style-name="T2">VOORLEZEN:</text:span> “Mmmm, ruiken jullie dat? Het is de roze kleur en de <text:span text:style-name="T2">Bloem</text:span>! Deze hoort bij jou <text:span text:style-name="T1">(naam Vlinder 5)</text:span>. De Bloem geeft je de kracht van de <text:span text:style-name="T2">Magische Stem</text:span>.”</text:p>
        </text:list-item>
        <text:list-item>
          <text:p text:style-name="P4"><text:span text:style-name="T2">Lopen naar het volgende spel:</text:span> <text:span text:style-name="T2">VOORLEZEN:</text:span> “Jij bent nu de Roze Leider. De grote machines op de bouwplaats maken veel lawaai, maar met jouw magische stem zing je daar makkelijk overheen! Jij mag een leuk liedje inzetten, en de hele weg naar de volgende bloem loopt iedereen luidkeels zingend achter je aan. We speuren naar de <text:span text:style-name="T2">Roze Tijd-Bloemen</text:span>!”</text:p>
        </text:list-item>
        <text:list-item>
          <text:p text:style-name="P4"><text:span text:style-name="T2">Actie:</text:span> Zingend achter Vlinder 5 aan. Roze bloemen zoeken.</text:p>
        </text:list-item>
      </text:list>
      <text:p text:style-name="Horizontal_20_Line"/>
      <text:h text:style-name="Heading_20_3" text:outline-level="3"><text:bookmark-start text:name="etappe-4-ontsnap-uit-het-spinnenweb-de-oranje-zon"/>☀️ ETAPPE 4: Ontsnap uit het Spinnenweb &amp; De Oranje Zon<text:bookmark-end text:name="etappe-4-ontsnap-uit-het-spinnenweb-de-oranje-zon"/></text:h>
      <text:list text:style-name="L5">
        <text:list-item>
          <text:p text:style-name="P5"><text:span text:style-name="T2">Aankomst bij Spel 4 (Ontsnap uit het Spinnenweb):</text:span> <text:span text:style-name="T2">VOORLEZEN:</text:span> “We hebben de roze bloemen bereikt, maar pas op! We zijn per ongeluk in een groot, onzichtbaar spinnenweb gelopen en zitten in de val. Wij maken samen het stevige web door in een kring te staan en elkaars handen héél goed vast te houden. Eén iemand zit vast in het midden. Gebruik al je wilde energie om uit dit kleverige web te ontsnappen!” <text:span text:style-name="T1">(Speel het spel. Wie in het midden staat, probeert onder de armen door te ontsnappen of de handen los te krijgen).</text:span></text:p>
        </text:list-item>
        <text:list-item>
          <text:p text:style-name="P5"><text:span text:style-name="T2">De Beloning:</text:span> <text:span text:style-name="T1">(Vlinder 6: Oranje Zon)</text:span> <text:span text:style-name="T2">VOORLEZEN:</text:span> “Wow, het web is gebroken! En kijk, het wordt hier opeens lekker warm. De zon schijnt zowaar door het bouwstof heen! We hebben de oranje kleur en de <text:span text:style-name="T2">Zon</text:span> gevonden! Dit is jouw kracht <text:span text:style-name="T1">(naam Vlinder 6)</text:span>. De Zon geeft je vrolijke <text:span text:style-name="T2">Zonne-energie</text:span>! Je kunt onmogelijk nog stilstaan.”</text:p>
        </text:list-item>
        <text:list-item>
          <text:p text:style-name="P5"><text:span text:style-name="T2">Lopen naar het volgende spel:</text:span> <text:span text:style-name="T2">VOORLEZEN:</text:span> “Jij bent nu de Oranje Leider. De hele weg naar de volgende bloem dansen, springen en swingen we achter je aan. Schud al dat bouwstof maar van je af! We zoeken de <text:span text:style-name="T2">Oranje Tijd-Bloemen</text:span>!”</text:p>
        </text:list-item>
        <text:list-item>
          <text:p text:style-name="P5"><text:span text:style-name="T2">Actie:</text:span> Al dansend en swingend achter Vlinder 6 aan. Oranje bloemen zoeken.</text:p>
        </text:list-item>
      </text:list>
      <text:p text:style-name="Horizontal_20_Line"/>
      <text:h text:style-name="Heading_20_3" text:outline-level="3"><text:bookmark-start text:name="etappe-5-annemaria-koekoek-de-groene-maan"/>🌙 ETAPPE 5: Annemaria Koekoek &amp; De Groene Maan<text:bookmark-end text:name="etappe-5-annemaria-koekoek-de-groene-maan"/></text:h>
      <text:list text:style-name="L6">
        <text:list-item>
          <text:p text:style-name="P6"><text:span text:style-name="T2">Aankomst bij Spel 5 (Annemaria Koekoek):</text:span> <text:span text:style-name="T2">VOORLEZEN:</text:span> “De oranje bloemen! We moeten hier héél stilletjes kunnen stilstaan. Tijd om dat te oefenen met Annemaria Koekoek! Eén iemand staat aan de muur. Wij proberen dichterbij te komen, maar als de roeper omdraait, moet je muisstil bevriezen!” <text:span text:style-name="T1">(Speel het spel).</text:span></text:p>
        </text:list-item>
        <text:list-item>
          <text:p text:style-name="P6"><text:span text:style-name="T2">De Beloning:</text:span> <text:span text:style-name="T1">(Vlinder 7: Groene Maan)</text:span> <text:span text:style-name="T2">VOORLEZEN:</text:span> “We zijn bijna bij het einde, ik voel het! Hier is de groene kleur en de <text:span text:style-name="T2">Maan</text:span>. Jouw beurt <text:span text:style-name="T1">(naam Vlinder 7)</text:span>. De Maan geeft je de kracht van <text:span text:style-name="T2">Absolute Stilte</text:span>.”</text:p>
        </text:list-item>
        <text:list-item>
          <text:p text:style-name="P6"><text:span text:style-name="T2">Lopen naar het volgende spel:</text:span> <text:span text:style-name="T2">VOORLEZEN:</text:span> “Jij bent onze volgende, Groene Leider. De laatste halte is vlakbij, maar we mogen niet gehoord worden door een reusachtige, slapende spin in de bosjes. Iedereen moet muisstil op zijn tenen achter jou aan sluipen. We zoeken de laatste, <text:span text:style-name="T2">Groene Tijd-Bloemen</text:span>!”</text:p>
        </text:list-item>
        <text:list-item>
          <text:p text:style-name="P6"><text:span text:style-name="T2">Actie:</text:span> Extreem stil en stiekem sluipen achter Vlinder 7. Groene bloemen zoeken.</text:p>
        </text:list-item>
      </text:list>
      <text:p text:style-name="Horizontal_20_Line"/>
      <text:h text:style-name="Heading_20_3" text:outline-level="3"><text:bookmark-start text:name="etappe-6-blindemannetje-de-paarse-ster-zilveren-kroon"/>⭐ ETAPPE 6: Blindemannetje &amp; De Paarse Ster + Zilveren Kroon<text:bookmark-end text:name="etappe-6-blindemannetje-de-paarse-ster-zilveren-kroon"/></text:h>
      <text:list text:style-name="L7">
        <text:list-item>
          <text:p text:style-name="P7"><text:span text:style-name="T2">Aankomst bij Spel 6 (Blindemannetje):</text:span> <text:span text:style-name="T2">VOORLEZEN:</text:span> “De groene bloemen! Het is hier mistig en we kunnen bijna niks zien. We gaan kijken of we kunnen voelen en horen waar iedereen is. We spelen Blindemannetje! Eén iemand krijgt een blinddoek om en probeert de anderen te tikken op gehoor.” <text:span text:style-name="T1">(Speel het spel).</text:span></text:p>
        </text:list-item>
        <text:list-item>
          <text:p text:style-name="P7"><text:span text:style-name="T2">De Beloning:</text:span> <text:span text:style-name="T1">(Vlinder 8: Paarse Ster | Vlinder 9: Zilveren Kroon)</text:span> <text:span text:style-name="T2">VOORLEZEN:</text:span> “Het wordt steeds stiller… maar kijk daar! Een paarse gloed! We hebben de paarse kleur en de <text:span text:style-name="T2">Ster</text:span> gevonden! Deze is voor jou <text:span text:style-name="T1">(naam Vlinder 8)</text:span>. De Ster geeft je de kracht van <text:span text:style-name="T2">Toverzicht</text:span> – je kunt door het stof heen kijken met je ogen dicht. En daar… een stralende <text:span text:style-name="T2">Kroon</text:span>! Deze is voor jou <text:span text:style-name="T1">(naam Vlinder 9)</text:span>. De Kroon geeft je de kracht van <text:span text:style-name="T2">Waakzaamheid</text:span> – jij houdt altijd alles in de gaten.”</text:p>
        </text:list-item>
        <text:list-item>
          <text:p text:style-name="P7"><text:span text:style-name="T2">Lopen naar de Schat:</text:span> <text:span text:style-name="T2">VOORLEZEN:</text:span> “Jullie zijn samen de Paarse Leiders. De allerlaatste weg is de moeilijkste. De Ster-leider moet vertrouwen op zijn/haar andere zintuigen en loopt geblinddoekt (of met de ogen dicht), en de Kroon-leider waakt over de veiligheid en wijst de weg. We sluipen achter jullie aan en zoeken het eindpunt aan de hand van de <text:span text:style-name="T2">Paarse Tijd-Bloemen</text:span>. Daar ligt de <text:span text:style-name="T2">Schat</text:span>!”</text:p>
        </text:list-item>
        <text:list-item>
          <text:p text:style-name="P7"><text:span text:style-name="T2">Actie:</text:span> Stilletjes en voorzichtig achter de leiders aan. De Ster-leider wordt door de Kroon-leider geleid en ze zoeken paarse bloemen naar de plek waar de schat ligt.</text:p>
        </text:list-item>
      </text:list>
      <text:p text:style-name="Horizontal_20_Line"/>
      <text:h text:style-name="Heading_20_3" text:outline-level="3"><text:bookmark-start text:name="de-finale-de-schat-ontcijferen"/>🧩 DE FINALE: De Schat Ontcijferen<text:bookmark-end text:name="de-finale-de-schat-ontcijferen"/></text:h>
      <text:p text:style-name="First_20_paragraph"><text:span text:style-name="T2">VOORLEZEN:</text:span> “Jongens, we hebben het gered! De wolk van bouwstof is eindelijk gaan liggen. Kijk eens naar jullie vlinders: ze hebben allemaal hun prachtige kleuren terug, hun speciale kracht, én… er staan magische letters op jullie vleugels!</text:p>
      <text:p text:style-name="Text_20_body">Jullie zijn allemaal weer kleurrijk en sterk. Maar de Vlinderschat kunnen we alleen vinden als we samenwerken.”</text:p>
      <text:p text:style-name="Text_20_body"><text:span text:style-name="T1">(Leg het codevel neer)</text:span></text:p>
      <text:p text:style-name="Text_20_body"><text:span text:style-name="T2">VOORLEZEN:</text:span> “Leg jullie vlinders bij de juiste symbolen op dit blad en lees de letters voor. Welk geheim woord staat daar? Laten we de schat zoeke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meta:generator>
    <dc:title/>
    <dc:description/>
    <dc:subject/>
    <meta:keyword/>
    <meta:initial-creator/>
    <dc:creator/>
    <meta:creation-date>2026-05-28T21:44:44Z</meta:creation-date>
    <dc:date>2026-05-28T21:44:44Z</dc:date>
  </office:meta>
</office:document-meta>
</file>